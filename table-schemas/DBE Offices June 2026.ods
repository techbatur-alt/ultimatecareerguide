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Inter" svg:font-family="Inte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263cm" fo:break-before="auto" style:use-optimal-row-height="tru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1.894cm" fo:break-before="auto" style:use-optimal-row-height="true"/>
    </style:style>
    <style:style style:name="ro5" style:family="table-row">
      <style:table-row-properties style:row-height="1.526cm" fo:break-before="auto" style:use-optimal-row-height="true"/>
    </style:style>
    <style:style style:name="ro6" style:family="table-row">
      <style:table-row-properties style:row-height="2.632cm" fo:break-before="auto" style:use-optimal-row-height="true"/>
    </style:style>
    <style:style style:name="ro7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dddddd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" style:family="table-cell" style:parent-style-name="Default" style:data-style-name="N0">
      <style:table-cell-properties fo:background-color="#d4ea6b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 style:data-style-name="N0">
      <style:table-cell-properties fo:background-color="#d4ea6b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fo:background-color="#d4ea6b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 style:data-style-name="N0">
      <style:table-cell-properties fo:background-color="#dddddd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 style:data-style-name="N0">
      <style:table-cell-properties fo:background-color="#d4ea6b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 style:data-style-name="N0">
      <style:table-cell-properties fo:background-color="#d4ea6b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" style:family="text">
      <style:text-properties fo:color="#000000" style:font-name="Arial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3"/>
        <table:table-column table:style-name="co1" table:number-columns-repeated="2" table:default-cell-style-name="ce8"/>
        <table:table-column table:style-name="co1" table:number-columns-repeated="2" table:default-cell-style-name="ce15"/>
        <table:table-row table:style-name="ro1">
          <table:table-cell table:style-name="ce1" office:value-type="string" calcext:value-type="string">
            <text:p>Province</text:p>
          </table:table-cell>
          <table:table-cell table:style-name="ce1" office:value-type="string" calcext:value-type="string">
            <text:p>District Name</text:p>
          </table:table-cell>
          <table:table-cell table:style-name="ce10" office:value-type="string" calcext:value-type="string">
            <text:p>Physical Address</text:p>
          </table:table-cell>
          <table:table-cell table:style-name="ce1" office:value-type="string" calcext:value-type="string">
            <text:p>Longittude</text:p>
          </table:table-cell>
          <table:table-cell table:style-name="ce1" office:value-type="string" calcext:value-type="string">
            <text:p>Lattitude</text:p>
          </table:table-cell>
        </table:table-row>
        <table:table-row table:style-name="ro2">
          <table:table-cell table:style-name="ce2" office:value-type="string" calcext:value-type="string">
            <text:p>Eastern Cape</text:p>
          </table:table-cell>
          <table:table-cell table:style-name="ce5" office:value-type="string" calcext:value-type="string">
            <text:p>Head Office</text:p>
          </table:table-cell>
          <table:table-cell table:style-name="ce5" office:value-type="string" calcext:value-type="string">
            <text:p>Steve Vukile Tshwete, Education Complex, Zone 6, Zwelitsha</text:p>
          </table:table-cell>
          <table:table-cell table:style-name="ce12" office:value-type="float" office:value="-32.9192268511812" calcext:value-type="float">
            <text:p>-32.9192268511812</text:p>
          </table:table-cell>
          <table:table-cell table:style-name="ce12" office:value-type="float" office:value="27.4147806228435" calcext:value-type="float">
            <text:p>27.4147806228435</text:p>
          </table:table-cell>
        </table:table-row>
        <table:table-row table:style-name="ro3">
          <table:table-cell office:value-type="string" calcext:value-type="string">
            <text:p>Eastern Cape</text:p>
          </table:table-cell>
          <table:table-cell table:style-name="ce6" office:value-type="string" calcext:value-type="string">
            <text:p>Cofimbvaba</text:p>
          </table:table-cell>
          <table:table-cell table:style-name="ce6" office:value-type="string" calcext:value-type="string">
            <text:p>42 Windus Street, Cofimbvaba </text:p>
          </table:table-cell>
          <table:table-cell table:style-name="ce13" office:value-type="float" office:value="-32.0034415634713" calcext:value-type="float">
            <text:p>-32.0034415634713</text:p>
          </table:table-cell>
          <table:table-cell table:style-name="ce13" office:value-type="float" office:value="27.5791438870329" calcext:value-type="float">
            <text:p>27.5791438870329</text:p>
          </table:table-cell>
        </table:table-row>
        <table:table-row table:style-name="ro4">
          <table:table-cell table:style-name="ce2" office:value-type="string" calcext:value-type="string">
            <text:p>Eastern Cape</text:p>
          </table:table-cell>
          <table:table-cell table:style-name="ce7" office:value-type="string" calcext:value-type="string">
            <text:p>CD</text:p>
            <text:p>Head Office</text:p>
          </table:table-cell>
          <table:table-cell table:style-name="ce7" office:value-type="string" calcext:value-type="string">
            <text:p>Zamukulungisa Industrial Sites</text:p>
            <text:p>Amendu Road, Mthatha</text:p>
          </table:table-cell>
          <table:table-cell table:style-name="ce14" office:value-type="float" office:value="-31.5893320178031" calcext:value-type="float">
            <text:p>-31.5893320178031</text:p>
          </table:table-cell>
          <table:table-cell table:style-name="ce14" office:value-type="float" office:value="28.792986083656" calcext:value-type="float">
            <text:p>28.792986083656</text:p>
          </table:table-cell>
        </table:table-row>
        <table:table-row table:style-name="ro2">
          <table:table-cell office:value-type="string" calcext:value-type="string">
            <text:p>Eastern Cape</text:p>
          </table:table-cell>
          <table:table-cell office:value-type="string" calcext:value-type="string">
            <text:p>Qumbu-OR Tambo</text:p>
            <text:p>Inland</text:p>
          </table:table-cell>
          <table:table-cell office:value-type="string" calcext:value-type="string">
            <text:p>82 South Street, Resource Centre, Building, Qumbu</text:p>
          </table:table-cell>
          <table:table-cell office:value-type="float" office:value="-31.1650724727182" calcext:value-type="float">
            <text:p>-31.1650724727182</text:p>
          </table:table-cell>
          <table:table-cell office:value-type="float" office:value="28.8760978742583" calcext:value-type="float">
            <text:p>28.8760978742583</text:p>
          </table:table-cell>
        </table:table-row>
        <table:table-row table:style-name="ro4">
          <table:table-cell office:value-type="string" calcext:value-type="string">
            <text:p>Eastern Cape</text:p>
          </table:table-cell>
          <table:table-cell office:value-type="string" calcext:value-type="string">
            <text:p>OR Tambo</text:p>
            <text:p>Coastal</text:p>
          </table:table-cell>
          <table:table-cell office:value-type="string" calcext:value-type="string">
            <text:p>Old Lusikisi College of</text:p>
            <text:p>Education , R61 Main Road</text:p>
          </table:table-cell>
          <table:table-cell office:value-type="float" office:value="-31.3547722643571" calcext:value-type="float">
            <text:p>-31.3547722643571</text:p>
          </table:table-cell>
          <table:table-cell office:value-type="float" office:value="29.5555025745964" calcext:value-type="float">
            <text:p>29.5555025745964</text:p>
          </table:table-cell>
        </table:table-row>
        <table:table-row table:style-name="ro5">
          <table:table-cell office:value-type="string" calcext:value-type="string">
            <text:p>Eastern Cape</text:p>
          </table:table-cell>
          <table:table-cell office:value-type="string" calcext:value-type="string">
            <text:p>Sterkspruit-Joe Gqabi</text:p>
          </table:table-cell>
          <table:table-cell office:value-type="string" calcext:value-type="string">
            <text:p>Main Street, Bensonvale College, Sterkspruit</text:p>
          </table:table-cell>
          <table:table-cell office:value-type="float" office:value="-30.5336875751925" calcext:value-type="float">
            <text:p>-30.5336875751925</text:p>
          </table:table-cell>
          <table:table-cell office:value-type="float" office:value="27.3537307756168" calcext:value-type="float">
            <text:p>27.3537307756168</text:p>
          </table:table-cell>
        </table:table-row>
        <table:table-row table:style-name="ro4">
          <table:table-cell office:value-type="string" calcext:value-type="string">
            <text:p>Eastern Cape</text:p>
          </table:table-cell>
          <table:table-cell office:value-type="string" calcext:value-type="string">
            <text:p>Ngcobo-Chris Hani East</text:p>
          </table:table-cell>
          <table:table-cell office:value-type="string" calcext:value-type="string">
            <text:p>Corner Church and High Street, Titus Building, Ngcobo</text:p>
          </table:table-cell>
          <table:table-cell office:value-type="float" office:value="-31.6764539635042" calcext:value-type="float">
            <text:p>-31.6764539635042</text:p>
          </table:table-cell>
          <table:table-cell office:value-type="float" office:value="27.9973782668667" calcext:value-type="float">
            <text:p>27.9973782668667</text:p>
          </table:table-cell>
        </table:table-row>
        <table:table-row table:style-name="ro4">
          <table:table-cell office:value-type="string" calcext:value-type="string">
            <text:p>Eastern Cape</text:p>
          </table:table-cell>
          <table:table-cell office:value-type="string" calcext:value-type="string">
            <text:p>Maluti-Alfred Nzo West</text:p>
          </table:table-cell>
          <table:table-cell office:value-type="string" calcext:value-type="string">
            <text:p>Maluti College of Education</text:p>
            <text:p>Maluti Township, Matatiele</text:p>
          </table:table-cell>
          <table:table-cell office:value-type="float" office:value="-30.2562859363341" calcext:value-type="float">
            <text:p>-30.2562859363341</text:p>
          </table:table-cell>
          <table:table-cell office:value-type="float" office:value="28.7950100641713" calcext:value-type="float">
            <text:p>28.7950100641713</text:p>
          </table:table-cell>
        </table:table-row>
        <table:table-row table:style-name="ro6">
          <table:table-cell office:value-type="string" calcext:value-type="string">
            <text:p>Eastern Cape</text:p>
          </table:table-cell>
          <table:table-cell office:value-type="string" calcext:value-type="string">
            <text:p>Mount Fletcher-Afred Nzo East</text:p>
          </table:table-cell>
          <table:table-cell office:value-type="string" calcext:value-type="string">
            <text:p>Resource Centre, Hospital Road Dept. of Education, Mount Fletcher</text:p>
          </table:table-cell>
          <table:table-cell office:value-type="float" office:value="-30.6910016857436" calcext:value-type="float">
            <text:p>-30.6910016857436</text:p>
          </table:table-cell>
          <table:table-cell office:value-type="float" office:value="28.5085573500733" calcext:value-type="float">
            <text:p>28.5085573500733</text:p>
          </table:table-cell>
        </table:table-row>
        <table:table-row table:style-name="ro4">
          <table:table-cell office:value-type="string" calcext:value-type="string">
            <text:p>Eastern Cape</text:p>
          </table:table-cell>
          <table:table-cell office:value-type="string" calcext:value-type="string">
            <text:p>Graaff-Reinet-Sarah Baartman</text:p>
          </table:table-cell>
          <table:table-cell office:value-type="string" calcext:value-type="string">
            <text:p>Dept. of Education, Paul Kruger Street, Graaf Reinet</text:p>
          </table:table-cell>
          <table:table-cell office:value-type="float" office:value="-32.2517345530053" calcext:value-type="float">
            <text:p>-32.2517345530053</text:p>
          </table:table-cell>
          <table:table-cell office:value-type="float" office:value="24.5402906341163" calcext:value-type="float">
            <text:p>24.5402906341163</text:p>
          </table:table-cell>
        </table:table-row>
        <table:table-row table:style-name="ro3">
          <table:table-cell office:value-type="string" calcext:value-type="string">
            <text:p>Eastern Cape</text:p>
          </table:table-cell>
          <table:table-cell office:value-type="string" calcext:value-type="string">
            <text:p>Grahamstown-Amatole West</text:p>
          </table:table-cell>
          <table:table-cell office:value-type="string" calcext:value-type="string">
            <text:p>St. Aidans Ave, Grahamstown</text:p>
          </table:table-cell>
          <table:table-cell office:value-type="float" office:value="-33.3040413345225" calcext:value-type="float">
            <text:p>-33.3040413345225</text:p>
          </table:table-cell>
          <table:table-cell office:value-type="float" office:value="26.5206800025961" calcext:value-type="float">
            <text:p>26.5206800025961</text:p>
          </table:table-cell>
        </table:table-row>
        <table:table-row table:style-name="ro4">
          <table:table-cell office:value-type="string" calcext:value-type="string">
            <text:p>Eastern Cape</text:p>
          </table:table-cell>
          <table:table-cell office:value-type="string" calcext:value-type="string">
            <text:p>Queenstown-Chris Hani West</text:p>
          </table:table-cell>
          <table:table-cell office:value-type="string" calcext:value-type="string">
            <text:p>2nd Limpopo Drive, Loriedashwood,</text:p>
            <text:p>Queenstown</text:p>
          </table:table-cell>
          <table:table-cell office:value-type="float" office:value="-31.9104038393158" calcext:value-type="float">
            <text:p>-31.9104038393158</text:p>
          </table:table-cell>
          <table:table-cell office:value-type="float" office:value="26.8960407072547" calcext:value-type="float">
            <text:p>26.8960407072547</text:p>
          </table:table-cell>
        </table:table-row>
        <table:table-row table:style-name="ro3">
          <table:table-cell office:value-type="string" calcext:value-type="string">
            <text:p>Eastern Cape</text:p>
          </table:table-cell>
          <table:table-cell office:value-type="string" calcext:value-type="string">
            <text:p>Uitenhage</text:p>
          </table:table-cell>
          <table:table-cell office:value-type="string" calcext:value-type="string">
            <text:p>87 Canon Street, Uitenhage</text:p>
          </table:table-cell>
          <table:table-cell office:value-type="float" office:value="-33.7631818807519" calcext:value-type="float">
            <text:p>-33.7631818807519</text:p>
          </table:table-cell>
          <table:table-cell office:value-type="float" office:value="25.399001546345" calcext:value-type="float">
            <text:p>25.399001546345</text:p>
          </table:table-cell>
        </table:table-row>
        <table:table-row table:style-name="ro3">
          <table:table-cell office:value-type="string" calcext:value-type="string">
            <text:p>Eastern Cape</text:p>
          </table:table-cell>
          <table:table-cell office:value-type="string" calcext:value-type="string">
            <text:p>Cradock, BCM</text:p>
          </table:table-cell>
          <table:table-cell office:value-type="string" calcext:value-type="string">
            <text:p>14 Dundas Street, Cradock</text:p>
          </table:table-cell>
          <table:table-cell office:value-type="float" office:value="-32.168608412763" calcext:value-type="float">
            <text:p>-32.168608412763</text:p>
          </table:table-cell>
          <table:table-cell office:value-type="float" office:value="25.615998482144" calcext:value-type="float">
            <text:p>25.615998482144</text:p>
          </table:table-cell>
        </table:table-row>
        <table:table-row table:style-name="ro4">
          <table:table-cell office:value-type="string" calcext:value-type="string">
            <text:p>Eastern Cape</text:p>
          </table:table-cell>
          <table:table-cell office:value-type="string" calcext:value-type="string">
            <text:p>Butterworth-Amatole East</text:p>
          </table:table-cell>
          <table:table-cell office:value-type="string" calcext:value-type="string">
            <text:p>Butterworth College, Mission Admin Area, Butterworth</text:p>
          </table:table-cell>
          <table:table-cell office:value-type="float" office:value="-32.3449917986035" calcext:value-type="float">
            <text:p>-32.3449917986035</text:p>
          </table:table-cell>
          <table:table-cell office:value-type="float" office:value="28.1340763534895" calcext:value-type="float">
            <text:p>28.1340763534895</text:p>
          </table:table-cell>
        </table:table-row>
        <table:table-row table:style-name="ro4">
          <table:table-cell office:value-type="string" calcext:value-type="string">
            <text:p>Eastern Cape</text:p>
          </table:table-cell>
          <table:table-cell office:value-type="string" calcext:value-type="string">
            <text:p>Dutywa </text:p>
          </table:table-cell>
          <table:table-cell office:value-type="string" calcext:value-type="string">
            <text:p>419 Railway Street, Public Works Premesis, Dutywa </text:p>
          </table:table-cell>
          <table:table-cell office:value-type="float" office:value="-32.0972224110823" calcext:value-type="float">
            <text:p>-32.0972224110823</text:p>
          </table:table-cell>
          <table:table-cell office:value-type="float" office:value="28.2976219991478" calcext:value-type="float">
            <text:p>28.2976219991478</text:p>
          </table:table-cell>
        </table:table-row>
        <table:table-row table:style-name="ro3">
          <table:table-cell office:value-type="string" calcext:value-type="string">
            <text:p>Eastern Cape</text:p>
          </table:table-cell>
          <table:table-cell office:value-type="string" calcext:value-type="string">
            <text:p>East London</text:p>
          </table:table-cell>
          <table:table-cell office:value-type="string" calcext:value-type="string">
            <text:p>Rubusana Blvd, Mdatsane </text:p>
          </table:table-cell>
          <table:table-cell office:value-type="float" office:value="-32.9359859376627" calcext:value-type="float">
            <text:p>-32.9359859376627</text:p>
          </table:table-cell>
          <table:table-cell office:value-type="float" office:value="27.7643634474813" calcext:value-type="float">
            <text:p>27.7643634474813</text:p>
          </table:table-cell>
        </table:table-row>
        <table:table-row table:style-name="ro2">
          <table:table-cell office:value-type="string" calcext:value-type="string">
            <text:p>Eastern Cape</text:p>
          </table:table-cell>
          <table:table-cell office:value-type="string" calcext:value-type="string">
            <text:p>Fort Beaufort </text:p>
          </table:table-cell>
          <table:table-cell office:value-type="string" calcext:value-type="string">
            <text:p>Healdtown Road, Healdtown Education College, Fort Beaufort </text:p>
          </table:table-cell>
          <table:table-cell office:value-type="float" office:value="-32.7316075271532" calcext:value-type="float">
            <text:p>-32.7316075271532</text:p>
          </table:table-cell>
          <table:table-cell office:value-type="float" office:value="26.7051550872325" calcext:value-type="float">
            <text:p>26.7051550872325</text:p>
          </table:table-cell>
        </table:table-row>
        <table:table-row table:style-name="ro3">
          <table:table-cell office:value-type="string" calcext:value-type="string">
            <text:p>Eastern Cape</text:p>
          </table:table-cell>
          <table:table-cell office:value-type="string" calcext:value-type="string">
            <text:p>Lady Frere</text:p>
          </table:table-cell>
          <table:table-cell office:value-type="string" calcext:value-type="string">
            <text:p>59 Sandile Street, Lady Frere </text:p>
          </table:table-cell>
          <table:table-cell office:value-type="float" office:value="-31.703044055426" calcext:value-type="float">
            <text:p>-31.703044055426</text:p>
          </table:table-cell>
          <table:table-cell office:value-type="float" office:value="27.2329039093415" calcext:value-type="float">
            <text:p>27.2329039093415</text:p>
          </table:table-cell>
        </table:table-row>
        <table:table-row table:style-name="ro4">
          <table:table-cell office:value-type="string" calcext:value-type="string">
            <text:p>Eastern Cape</text:p>
          </table:table-cell>
          <table:table-cell office:value-type="string" calcext:value-type="string">
            <text:p>Libode-Umthata</text:p>
          </table:table-cell>
          <table:table-cell office:value-type="string" calcext:value-type="string">
            <text:p>KG Mathanzima bld, Owen Street, Mthatha </text:p>
          </table:table-cell>
          <table:table-cell office:value-type="float" office:value="-31.5901320031931" calcext:value-type="float">
            <text:p>-31.5901320031931</text:p>
          </table:table-cell>
          <table:table-cell office:value-type="float" office:value="28.7871951717637" calcext:value-type="float">
            <text:p>28.7871951717637</text:p>
          </table:table-cell>
        </table:table-row>
        <table:table-row table:style-name="ro3">
          <table:table-cell office:value-type="string" calcext:value-type="string">
            <text:p>Eastern Cape</text:p>
          </table:table-cell>
          <table:table-cell office:value-type="string" calcext:value-type="string">
            <text:p>Lusikisiki</text:p>
          </table:table-cell>
          <table:table-cell office:value-type="string" calcext:value-type="string">
            <text:p>Lusikisiki College, R61 Main Road, <text:s/></text:p>
          </table:table-cell>
          <table:table-cell office:value-type="float" office:value="-31.3546688131058" calcext:value-type="float">
            <text:p>-31.3546688131058</text:p>
          </table:table-cell>
          <table:table-cell office:value-type="float" office:value="29.5553977295417" calcext:value-type="float">
            <text:p>29.5553977295417</text:p>
          </table:table-cell>
        </table:table-row>
        <table:table-row table:style-name="ro5">
          <table:table-cell office:value-type="string" calcext:value-type="string">
            <text:p>Eastern Cape</text:p>
          </table:table-cell>
          <table:table-cell office:value-type="string" calcext:value-type="string">
            <text:p>Mbizana</text:p>
          </table:table-cell>
          <table:table-cell office:value-type="string" calcext:value-type="string">
            <text:p>Magistrate Office Main Street, Mbizana</text:p>
          </table:table-cell>
          <table:table-cell office:value-type="float" office:value="-30.8555457404691" calcext:value-type="float">
            <text:p>-30.8555457404691</text:p>
          </table:table-cell>
          <table:table-cell office:value-type="float" office:value="29.8559462762253" calcext:value-type="float">
            <text:p>29.8559462762253</text:p>
          </table:table-cell>
        </table:table-row>
        <table:table-row table:style-name="ro5">
          <table:table-cell office:value-type="string" calcext:value-type="string">
            <text:p>Eastern Cape</text:p>
          </table:table-cell>
          <table:table-cell office:value-type="string" calcext:value-type="string">
            <text:p>Mt. Frere </text:p>
          </table:table-cell>
          <table:table-cell office:value-type="string" calcext:value-type="string">
            <text:p>Old Mutual Building, Main Street, Mt. Frere </text:p>
          </table:table-cell>
          <table:table-cell office:value-type="float" office:value="-30.9003890385594" calcext:value-type="float">
            <text:p>-30.9003890385594</text:p>
          </table:table-cell>
          <table:table-cell office:value-type="float" office:value="28.9942658241053" calcext:value-type="float">
            <text:p>28.9942658241053</text:p>
          </table:table-cell>
        </table:table-row>
        <table:table-row table:style-name="ro4">
          <table:table-cell office:value-type="string" calcext:value-type="string">
            <text:p>Eastern Cape</text:p>
          </table:table-cell>
          <table:table-cell office:value-type="string" calcext:value-type="string">
            <text:p>Mthatha</text:p>
          </table:table-cell>
          <table:table-cell office:value-type="string" calcext:value-type="string">
            <text:p>Botha Sigcau Building, Office No.41, Ground Floor, Mthatha </text:p>
          </table:table-cell>
          <table:table-cell office:value-type="float" office:value="-31.5897043665197" calcext:value-type="float">
            <text:p>-31.5897043665197</text:p>
          </table:table-cell>
          <table:table-cell office:value-type="float" office:value="28.7872211413278" calcext:value-type="float">
            <text:p>28.7872211413278</text:p>
          </table:table-cell>
        </table:table-row>
        <table:table-row table:style-name="ro5">
          <table:table-cell office:value-type="string" calcext:value-type="string">
            <text:p>Eastern Cape</text:p>
          </table:table-cell>
          <table:table-cell office:value-type="string" calcext:value-type="string">
            <text:p>Gqberqa</text:p>
          </table:table-cell>
          <table:table-cell office:value-type="string" calcext:value-type="string">
            <text:p>Dept of Education PE, 42 Sutton Str, Sydwell </text:p>
          </table:table-cell>
          <table:table-cell office:value-type="float" office:value="-33.9203790291505" calcext:value-type="float">
            <text:p>-33.9203790291505</text:p>
          </table:table-cell>
          <table:table-cell office:value-type="float" office:value="25.5949720800619" calcext:value-type="float">
            <text:p>25.5949720800619</text:p>
          </table:table-cell>
        </table:table-row>
        <table:table-row table:style-name="ro6">
          <table:table-cell table:style-name="ce2" office:value-type="string" calcext:value-type="string">
            <text:p>Free State</text:p>
          </table:table-cell>
          <table:table-cell table:style-name="ce7" office:value-type="string" calcext:value-type="string">
            <text:p>Head Office</text:p>
          </table:table-cell>
          <table:table-cell table:style-name="ce7" office:value-type="string" calcext:value-type="string">
            <text:p>Room 1703 Free State, Provincial Building, 55 Elizabeth Street</text:p>
            <text:p>Bloemfontein</text:p>
          </table:table-cell>
          <table:table-cell table:style-name="ce12" office:value-type="float" office:value="-29.1068303453935" calcext:value-type="float">
            <text:p>-29.1068303453935</text:p>
          </table:table-cell>
          <table:table-cell table:style-name="ce12" office:value-type="float" office:value="26.1561574895749" calcext:value-type="float">
            <text:p>26.1561574895749</text:p>
          </table:table-cell>
        </table:table-row>
        <table:table-row table:style-name="ro3">
          <table:table-cell office:value-type="string" calcext:value-type="string">
            <text:p>Free State</text:p>
          </table:table-cell>
          <table:table-cell office:value-type="string" calcext:value-type="string">
            <text:p>Fezile Dabi</text:p>
          </table:table-cell>
          <table:table-cell office:value-type="string" calcext:value-type="string">
            <text:p>23 Totius Street, Sasolburg</text:p>
          </table:table-cell>
          <table:table-cell office:value-type="float" office:value="-26.7979328798816" calcext:value-type="float">
            <text:p>-26.7979328798816</text:p>
          </table:table-cell>
          <table:table-cell office:value-type="float" office:value="27.8162946712856" calcext:value-type="float">
            <text:p>27.8162946712856</text:p>
          </table:table-cell>
        </table:table-row>
        <table:table-row table:style-name="ro5">
          <table:table-cell office:value-type="string" calcext:value-type="string">
            <text:p>Free State</text:p>
          </table:table-cell>
          <table:table-cell office:value-type="string" calcext:value-type="string">
            <text:p>Thabo</text:p>
            <text:p>Mofutsanyana</text:p>
          </table:table-cell>
          <table:table-cell office:value-type="string" calcext:value-type="string">
            <text:p>Mampoi Street Ex-Parliament Biulding, Witsieshoek</text:p>
          </table:table-cell>
          <table:table-cell office:value-type="float" office:value="-28.5293833965237" calcext:value-type="float">
            <text:p>-28.5293833965237</text:p>
          </table:table-cell>
          <table:table-cell office:value-type="float" office:value="28.7966881060032" calcext:value-type="float">
            <text:p>28.7966881060032</text:p>
          </table:table-cell>
        </table:table-row>
        <table:table-row table:style-name="ro5">
          <table:table-cell office:value-type="string" calcext:value-type="string">
            <text:p>Free State</text:p>
          </table:table-cell>
          <table:table-cell office:value-type="string" calcext:value-type="string">
            <text:p>Lejweleputswa</text:p>
          </table:table-cell>
          <table:table-cell office:value-type="string" calcext:value-type="string">
            <text:p>Cnr Stateway and Tulbach Street, Welkom</text:p>
          </table:table-cell>
          <table:table-cell office:value-type="float" office:value="-27.9804976252353" calcext:value-type="float">
            <text:p>-27.9804976252353</text:p>
          </table:table-cell>
          <table:table-cell office:value-type="float" office:value="26.7394816171598" calcext:value-type="float">
            <text:p>26.7394816171598</text:p>
          </table:table-cell>
        </table:table-row>
        <table:table-row table:style-name="ro4">
          <table:table-cell office:value-type="string" calcext:value-type="string">
            <text:p>Free State</text:p>
          </table:table-cell>
          <table:table-cell office:value-type="string" calcext:value-type="string">
            <text:p>Motheo</text:p>
          </table:table-cell>
          <table:table-cell office:value-type="string" calcext:value-type="string">
            <text:p>Cnr St. Andrew and Markgraaf Street, Bloemfontein</text:p>
          </table:table-cell>
          <table:table-cell table:style-name="ce13" office:value-type="float" office:value="-29.117234909424" calcext:value-type="float">
            <text:p>-29.117234909424</text:p>
          </table:table-cell>
          <table:table-cell table:style-name="ce13" office:value-type="float" office:value="26.2154532386956" calcext:value-type="float">
            <text:p>26.2154532386956</text:p>
          </table:table-cell>
        </table:table-row>
        <table:table-row table:style-name="ro5">
          <table:table-cell office:value-type="string" calcext:value-type="string">
            <text:p>Free State</text:p>
          </table:table-cell>
          <table:table-cell office:value-type="string" calcext:value-type="string">
            <text:p>Xhariep</text:p>
          </table:table-cell>
          <table:table-cell office:value-type="string" calcext:value-type="string">
            <text:p>Andrew and Markgraaf Street</text:p>
            <text:p>Bloemfontein</text:p>
          </table:table-cell>
          <table:table-cell table:style-name="ce13" office:value-type="float" office:value="-29.117234909424" calcext:value-type="float">
            <text:p>-29.117234909424</text:p>
          </table:table-cell>
          <table:table-cell table:style-name="ce13" office:value-type="float" office:value="26.2154532386956" calcext:value-type="float">
            <text:p>26.2154532386956</text:p>
          </table:table-cell>
        </table:table-row>
        <table:table-row table:style-name="ro5">
          <table:table-cell table:style-name="ce2" office:value-type="string" calcext:value-type="string">
            <text:p>Gauteng</text:p>
          </table:table-cell>
          <table:table-cell table:style-name="ce7" office:value-type="string" calcext:value-type="string">
            <text:p>Head Office</text:p>
          </table:table-cell>
          <table:table-cell table:style-name="ce7" office:value-type="string" calcext:value-type="string">
            <text:p>111 Commissioner Street</text:p>
            <text:p>Johannesburg</text:p>
          </table:table-cell>
          <table:table-cell table:style-name="ce14" office:value-type="float" office:value="-26.204799541705" calcext:value-type="float">
            <text:p>-26.204799541705</text:p>
          </table:table-cell>
          <table:table-cell table:style-name="ce14" office:value-type="float" office:value="28.0435771405642" calcext:value-type="float">
            <text:p>28.0435771405642</text:p>
          </table:table-cell>
        </table:table-row>
        <table:table-row table:style-name="ro5">
          <table:table-cell table:style-name="ce2" office:value-type="string" calcext:value-type="string">
            <text:p>Gauteng</text:p>
          </table:table-cell>
          <table:table-cell table:style-name="ce7" office:value-type="string" calcext:value-type="string">
            <text:p>JHB Region</text:p>
          </table:table-cell>
          <table:table-cell table:style-name="ce7" office:value-type="string" calcext:value-type="string">
            <text:p>111 Commissioner Street</text:p>
            <text:p>Johannesburg</text:p>
          </table:table-cell>
          <table:table-cell table:style-name="ce14" office:value-type="float" office:value="-26.204799541705" calcext:value-type="float">
            <text:p>-26.204799541705</text:p>
          </table:table-cell>
          <table:table-cell table:style-name="ce14" office:value-type="float" office:value="28.0435771405642" calcext:value-type="float">
            <text:p>28.0435771405642</text:p>
          </table:table-cell>
        </table:table-row>
        <table:table-row table:style-name="ro2">
          <table:table-cell office:value-type="string" calcext:value-type="string">
            <text:p>Gauteng</text:p>
          </table:table-cell>
          <table:table-cell office:value-type="string" calcext:value-type="string">
            <text:p>JHB Central</text:p>
            <text:p>District D14</text:p>
          </table:table-cell>
          <table:table-cell office:value-type="string" calcext:value-type="string">
            <text:p>Corner Modjadji and Old Potch Road, Soweto College, </text:p>
            <text:p>Pimville​</text:p>
          </table:table-cell>
          <table:table-cell office:value-type="float" office:value="-26.260277659069" calcext:value-type="float">
            <text:p>-26.260277659069</text:p>
          </table:table-cell>
          <table:table-cell office:value-type="float" office:value="27.9166904782558" calcext:value-type="float">
            <text:p>27.9166904782558</text:p>
          </table:table-cell>
        </table:table-row>
        <table:table-row table:style-name="ro2">
          <table:table-cell office:value-type="string" calcext:value-type="string">
            <text:p>Gauteng</text:p>
          </table:table-cell>
          <table:table-cell office:value-type="string" calcext:value-type="string">
            <text:p>JHB North</text:p>
          </table:table-cell>
          <table:table-cell office:value-type="string" calcext:value-type="string">
            <text:p>Cnr Jorrison and Biccard Street, FNB Building, 2nd Floor, Braamfontein</text:p>
          </table:table-cell>
          <table:table-cell office:value-type="float" office:value="-26.19288991108" calcext:value-type="float">
            <text:p>-26.19288991108</text:p>
          </table:table-cell>
          <table:table-cell office:value-type="float" office:value="28.0368244102117" calcext:value-type="float">
            <text:p>28.0368244102117</text:p>
          </table:table-cell>
        </table:table-row>
        <table:table-row table:style-name="ro7">
          <table:table-cell office:value-type="string" calcext:value-type="string">
            <text:p>Gauteng</text:p>
          </table:table-cell>
          <table:table-cell office:value-type="string" calcext:value-type="string">
            <text:p>JHB West</text:p>
          </table:table-cell>
          <table:table-cell office:value-type="string" calcext:value-type="string">
            <text:p>20 Goldman Street, Florida</text:p>
          </table:table-cell>
          <table:table-cell office:value-type="float" office:value="-26.1720390829727" calcext:value-type="float">
            <text:p>-26.1720390829727</text:p>
          </table:table-cell>
          <table:table-cell office:value-type="float" office:value="27.9101749693783" calcext:value-type="float">
            <text:p>27.9101749693783</text:p>
          </table:table-cell>
        </table:table-row>
        <table:table-row table:style-name="ro6">
          <table:table-cell office:value-type="string" calcext:value-type="string">
            <text:p>Gauteng</text:p>
          </table:table-cell>
          <table:table-cell office:value-type="string" calcext:value-type="string">
            <text:p>JHB South</text:p>
          </table:table-cell>
          <table:table-cell office:value-type="string" calcext:value-type="string">
            <text:p>100 Northern Parkway Drive, 2nd Floor, Crownwood Office Park, Ormonde</text:p>
          </table:table-cell>
          <table:table-cell office:value-type="float" office:value="-26.2401330246833" calcext:value-type="float">
            <text:p>-26.2401330246833</text:p>
          </table:table-cell>
          <table:table-cell office:value-type="float" office:value="28.0049704816377" calcext:value-type="float">
            <text:p>28.0049704816377</text:p>
          </table:table-cell>
        </table:table-row>
        <table:table-row table:style-name="ro5">
          <table:table-cell office:value-type="string" calcext:value-type="string">
            <text:p>Gauteng</text:p>
          </table:table-cell>
          <table:table-cell office:value-type="string" calcext:value-type="string">
            <text:p>JHB East</text:p>
          </table:table-cell>
          <table:table-cell office:value-type="string" calcext:value-type="string">
            <text:p>142 Fourth Street, Parkmore</text:p>
            <text:p> </text:p>
          </table:table-cell>
          <table:table-cell office:value-type="float" office:value="-26.1044561384324" calcext:value-type="float">
            <text:p>-26.1044561384324</text:p>
          </table:table-cell>
          <table:table-cell office:value-type="float" office:value="28.0454610548591" calcext:value-type="float">
            <text:p>28.0454610548591</text:p>
          </table:table-cell>
        </table:table-row>
        <table:table-row table:style-name="ro5">
          <table:table-cell table:style-name="ce2" office:value-type="string" calcext:value-type="string">
            <text:p>Gauteng</text:p>
          </table:table-cell>
          <table:table-cell table:style-name="ce7" office:value-type="string" calcext:value-type="string">
            <text:p>Ekurhuleni Region</text:p>
          </table:table-cell>
          <table:table-cell table:style-name="ce7" office:value-type="string" calcext:value-type="string">
            <text:p>111 Commissioner Street</text:p>
            <text:p>Johannesburg</text:p>
          </table:table-cell>
          <table:table-cell table:style-name="ce14" office:value-type="float" office:value="-26.204799541705" calcext:value-type="float">
            <text:p>-26.204799541705</text:p>
          </table:table-cell>
          <table:table-cell table:style-name="ce14" office:value-type="float" office:value="28.0435771405642" calcext:value-type="float">
            <text:p>28.0435771405642</text:p>
          </table:table-cell>
        </table:table-row>
        <table:table-row table:style-name="ro4">
          <table:table-cell office:value-type="string" calcext:value-type="string">
            <text:p>Gauteng</text:p>
          </table:table-cell>
          <table:table-cell office:value-type="string" calcext:value-type="string">
            <text:p>Gauteng</text:p>
            <text:p>East</text:p>
          </table:table-cell>
          <table:table-cell office:value-type="string" calcext:value-type="string">
            <text:p>Cnr. 2nd Avenue and 3rd Street, Old FNB Building</text:p>
            <text:p>Springs</text:p>
          </table:table-cell>
          <table:table-cell office:value-type="float" office:value="-26.2519626364193" calcext:value-type="float">
            <text:p>-26.2519626364193</text:p>
          </table:table-cell>
          <table:table-cell office:value-type="float" office:value="28.4392431308977" calcext:value-type="float">
            <text:p>28.4392431308977</text:p>
          </table:table-cell>
        </table:table-row>
        <table:table-row table:style-name="ro4">
          <table:table-cell office:value-type="string" calcext:value-type="string">
            <text:p>Gauteng</text:p>
          </table:table-cell>
          <table:table-cell office:value-type="string" calcext:value-type="string">
            <text:p>Ekurhuleni</text:p>
            <text:p>South</text:p>
          </table:table-cell>
          <table:table-cell office:value-type="string" calcext:value-type="string">
            <text:p>BlocK D Infinity Office Park</text:p>
            <text:p>2 Robin Close, Meyersdale</text:p>
          </table:table-cell>
          <table:table-cell office:value-type="float" office:value="-26.2882615235779" calcext:value-type="float">
            <text:p>-26.2882615235779</text:p>
          </table:table-cell>
          <table:table-cell office:value-type="float" office:value="28.0896862395697" calcext:value-type="float">
            <text:p>28.0896862395697</text:p>
          </table:table-cell>
        </table:table-row>
        <table:table-row table:style-name="ro2">
          <table:table-cell office:value-type="string" calcext:value-type="string">
            <text:p>Gauteng</text:p>
          </table:table-cell>
          <table:table-cell office:value-type="string" calcext:value-type="string">
            <text:p>Ekurhuleni</text:p>
            <text:p>North</text:p>
          </table:table-cell>
          <table:table-cell office:value-type="string" calcext:value-type="string">
            <text:p>No. 78 Howard Avenue,  Munpen Building, Benoni​</text:p>
          </table:table-cell>
          <table:table-cell office:value-type="float" office:value="-26.1879205962972" calcext:value-type="float">
            <text:p>-26.1879205962972</text:p>
          </table:table-cell>
          <table:table-cell office:value-type="float" office:value="28.3161667682384" calcext:value-type="float">
            <text:p>28.3161667682384</text:p>
          </table:table-cell>
        </table:table-row>
        <table:table-row table:style-name="ro5">
          <table:table-cell table:style-name="ce2" office:value-type="string" calcext:value-type="string">
            <text:p>Gauteng</text:p>
          </table:table-cell>
          <table:table-cell table:style-name="ce5" office:value-type="string" calcext:value-type="string">
            <text:p>Tshwane Region</text:p>
          </table:table-cell>
          <table:table-cell table:style-name="ce5" office:value-type="string" calcext:value-type="string">
            <text:p>17 Talis House Simon Street,</text:p>
            <text:p>Marshall Town</text:p>
          </table:table-cell>
          <table:table-cell table:style-name="ce12" office:value-type="float" office:value="-26.2070383888972" calcext:value-type="float">
            <text:p>-26.2070383888972</text:p>
          </table:table-cell>
          <table:table-cell table:style-name="ce12" office:value-type="float" office:value="28.0400103568796" calcext:value-type="float">
            <text:p>28.0400103568796</text:p>
          </table:table-cell>
        </table:table-row>
        <table:table-row table:style-name="ro2">
          <table:table-cell office:value-type="string" calcext:value-type="string">
            <text:p>Gauteng</text:p>
          </table:table-cell>
          <table:table-cell office:value-type="string" calcext:value-type="string">
            <text:p>Tshwane</text:p>
            <text:p>South</text:p>
          </table:table-cell>
          <table:table-cell office:value-type="string" calcext:value-type="string">
            <text:p>265 Pretorius Street,</text:p>
            <text:p>President Tower Building</text:p>
            <text:p>Pretoria</text:p>
          </table:table-cell>
          <table:table-cell office:value-type="float" office:value="-25.7480735200277" calcext:value-type="float">
            <text:p>-25.7480735200277</text:p>
          </table:table-cell>
          <table:table-cell office:value-type="float" office:value="28.1919769511267" calcext:value-type="float">
            <text:p>28.1919769511267</text:p>
          </table:table-cell>
        </table:table-row>
        <table:table-row table:style-name="ro4">
          <table:table-cell office:value-type="string" calcext:value-type="string">
            <text:p>Gauteng</text:p>
          </table:table-cell>
          <table:table-cell office:value-type="string" calcext:value-type="string">
            <text:p>Tshwane</text:p>
            <text:p>North</text:p>
          </table:table-cell>
          <table:table-cell office:value-type="string" calcext:value-type="string">
            <text:p>Lavender Road, Wonderboom</text:p>
            <text:p>Junction Mall, Sinoville</text:p>
          </table:table-cell>
          <table:table-cell office:value-type="float" office:value="-25.6856249521104" calcext:value-type="float">
            <text:p>-25.6856249521104</text:p>
          </table:table-cell>
          <table:table-cell office:value-type="float" office:value="28.1900515553144" calcext:value-type="float">
            <text:p>28.1900515553144</text:p>
          </table:table-cell>
        </table:table-row>
        <table:table-row table:style-name="ro2">
          <table:table-cell office:value-type="string" calcext:value-type="string">
            <text:p>Gauteng</text:p>
          </table:table-cell>
          <table:table-cell office:value-type="string" calcext:value-type="string">
            <text:p>Tshwane</text:p>
            <text:p>West</text:p>
          </table:table-cell>
          <table:table-cell office:value-type="string" calcext:value-type="string">
            <text:p>Old Hebron College, Klipgat Road (Near Odi Hospital), Mabopane</text:p>
          </table:table-cell>
          <table:table-cell office:value-type="float" office:value="-25.5159085239046" calcext:value-type="float">
            <text:p>-25.5159085239046</text:p>
          </table:table-cell>
          <table:table-cell office:value-type="float" office:value="28.0209323263276" calcext:value-type="float">
            <text:p>28.0209323263276</text:p>
          </table:table-cell>
        </table:table-row>
        <table:table-row table:style-name="ro5">
          <table:table-cell office:value-type="string" calcext:value-type="string">
            <text:p>Gauteng</text:p>
          </table:table-cell>
          <table:table-cell office:value-type="string" calcext:value-type="string">
            <text:p>Gauteng</text:p>
            <text:p>North</text:p>
          </table:table-cell>
          <table:table-cell office:value-type="string" calcext:value-type="string">
            <text:p>86 Valdegrace Watermeyer</text:p>
            <text:p>Street, Pretoria</text:p>
          </table:table-cell>
          <table:table-cell office:value-type="float" office:value="-25.7425458215565" calcext:value-type="float">
            <text:p>-25.7425458215565</text:p>
          </table:table-cell>
          <table:table-cell office:value-type="float" office:value="28.2994663522318" calcext:value-type="float">
            <text:p>28.2994663522318</text:p>
          </table:table-cell>
        </table:table-row>
        <table:table-row table:style-name="ro5">
          <table:table-cell table:style-name="ce2" office:value-type="string" calcext:value-type="string">
            <text:p>Gauteng</text:p>
          </table:table-cell>
          <table:table-cell table:style-name="ce7" office:value-type="string" calcext:value-type="string">
            <text:p>Sediwes Region</text:p>
          </table:table-cell>
          <table:table-cell table:style-name="ce7" office:value-type="string" calcext:value-type="string">
            <text:p>111 Commissioner Street</text:p>
            <text:p>Johannesburg</text:p>
          </table:table-cell>
          <table:table-cell table:style-name="ce14" table:number-columns-repeated="2"/>
        </table:table-row>
        <table:table-row table:style-name="ro5">
          <table:table-cell office:value-type="string" calcext:value-type="string">
            <text:p>Gauteng</text:p>
          </table:table-cell>
          <table:table-cell office:value-type="string" calcext:value-type="string">
            <text:p>Gauteng</text:p>
            <text:p>West</text:p>
          </table:table-cell>
          <table:table-cell office:value-type="string" calcext:value-type="string">
            <text:p>Cnr. Human and Boshoff Streets Krugersdorp</text:p>
          </table:table-cell>
          <table:table-cell office:value-type="float" office:value="-26.104510397724" calcext:value-type="float">
            <text:p>-26.104510397724</text:p>
          </table:table-cell>
          <table:table-cell office:value-type="float" office:value="27.7773304534597" calcext:value-type="float">
            <text:p>27.7773304534597</text:p>
          </table:table-cell>
        </table:table-row>
        <table:table-row table:style-name="ro2">
          <table:table-cell office:value-type="string" calcext:value-type="string">
            <text:p>Gauteng</text:p>
          </table:table-cell>
          <table:table-cell office:value-type="string" calcext:value-type="string">
            <text:p>Sedibeng</text:p>
            <text:p>East</text:p>
          </table:table-cell>
          <table:table-cell office:value-type="string" calcext:value-type="string">
            <text:p>Corner Jouber and Kruger Avenue, Sanlam Building, Vereeniging​</text:p>
          </table:table-cell>
          <table:table-cell office:value-type="float" office:value="-26.67199464314" calcext:value-type="float">
            <text:p>-26.67199464314</text:p>
          </table:table-cell>
          <table:table-cell office:value-type="float" office:value="27.9278625480399" calcext:value-type="float">
            <text:p>27.9278625480399</text:p>
          </table:table-cell>
        </table:table-row>
        <table:table-row table:style-name="ro5">
          <table:table-cell office:value-type="string" calcext:value-type="string">
            <text:p>Gauteng</text:p>
          </table:table-cell>
          <table:table-cell office:value-type="string" calcext:value-type="string">
            <text:p>Sedibeng West</text:p>
          </table:table-cell>
          <table:table-cell office:value-type="string" calcext:value-type="string">
            <text:p>06 Samuel Street, Sebokeng</text:p>
            <text:p>College</text:p>
          </table:table-cell>
          <table:table-cell office:value-type="float" office:value="-26.6087326206964" calcext:value-type="float">
            <text:p>-26.6087326206964</text:p>
          </table:table-cell>
          <table:table-cell office:value-type="float" office:value="27.8395074546323" calcext:value-type="float">
            <text:p>27.8395074546323</text:p>
          </table:table-cell>
        </table:table-row>
        <table:table-row table:style-name="ro4">
          <table:table-cell table:style-name="ce2" office:value-type="string" calcext:value-type="string">
            <text:p>KZN</text:p>
          </table:table-cell>
          <table:table-cell table:style-name="ce5" office:value-type="string" calcext:value-type="string">
            <text:p>Head Office</text:p>
          </table:table-cell>
          <table:table-cell table:style-name="ce5" office:value-type="string" calcext:value-type="string">
            <text:p>247 Burger Street Pietermaritzburg</text:p>
            <text:p> </text:p>
          </table:table-cell>
          <table:table-cell table:style-name="ce12" office:value-type="float" office:value="-29.6052935082408" calcext:value-type="float">
            <text:p>-29.6052935082408</text:p>
          </table:table-cell>
          <table:table-cell table:style-name="ce12" office:value-type="float" office:value="30.3819114643696" calcext:value-type="float">
            <text:p>30.3819114643696</text:p>
          </table:table-cell>
        </table:table-row>
        <table:table-row table:style-name="ro2">
          <table:table-cell table:style-name="ce2" office:value-type="string" calcext:value-type="string">
            <text:p>KZN</text:p>
          </table:table-cell>
          <table:table-cell table:style-name="ce5" office:value-type="string" calcext:value-type="string">
            <text:p>Regional Office</text:p>
          </table:table-cell>
          <table:table-cell table:style-name="ce7" office:value-type="string" calcext:value-type="string">
            <text:p>Anton Lembede Building 247 Burger Street, Pietermaritzburg</text:p>
          </table:table-cell>
          <table:table-cell table:style-name="ce14" office:value-type="float" office:value="-29.6051355001968" calcext:value-type="float">
            <text:p>-29.6051355001968</text:p>
          </table:table-cell>
          <table:table-cell table:style-name="ce14" office:value-type="float" office:value="30.381983325459" calcext:value-type="float">
            <text:p>30.381983325459</text:p>
          </table:table-cell>
        </table:table-row>
        <table:table-row table:style-name="ro2">
          <table:table-cell office:value-type="string" calcext:value-type="string">
            <text:p>KZN</text:p>
          </table:table-cell>
          <table:table-cell office:value-type="string" calcext:value-type="string">
            <text:p>Amajuba</text:p>
          </table:table-cell>
          <table:table-cell office:value-type="string" calcext:value-type="string">
            <text:p>School of <text:s/>industry, 113 Panorama Drive, Lelloxto, Newcastle <text:s text:c="2"/></text:p>
          </table:table-cell>
          <table:table-cell office:value-type="float" office:value="-27.7739870987483" calcext:value-type="float">
            <text:p>-27.7739870987483</text:p>
          </table:table-cell>
          <table:table-cell office:value-type="float" office:value="29.9092420260994" calcext:value-type="float">
            <text:p>29.9092420260994</text:p>
          </table:table-cell>
        </table:table-row>
        <table:table-row table:style-name="ro5">
          <table:table-cell office:value-type="string" calcext:value-type="string">
            <text:p>KZN</text:p>
          </table:table-cell>
          <table:table-cell office:value-type="string" calcext:value-type="string">
            <text:p>Ilembe</text:p>
          </table:table-cell>
          <table:table-cell office:value-type="string" calcext:value-type="string">
            <text:p><text:span text:style-name="T1">72 Stalaart Simelane Str, Durban, 4000</text:span></text:p>
            <text:p><text:span text:style-name="T1"> </text:span></text:p>
          </table:table-cell>
          <table:table-cell office:value-type="float" office:value="-29.3428654819238" calcext:value-type="float">
            <text:p>-29.3428654819238</text:p>
          </table:table-cell>
          <table:table-cell office:value-type="float" office:value="31.29797755819" calcext:value-type="float">
            <text:p>31.29797755819</text:p>
          </table:table-cell>
        </table:table-row>
        <table:table-row table:style-name="ro5">
          <table:table-cell office:value-type="string" calcext:value-type="string">
            <text:p>KZN</text:p>
          </table:table-cell>
          <table:table-cell office:value-type="string" calcext:value-type="string">
            <text:p>Pinetown</text:p>
          </table:table-cell>
          <table:table-cell office:value-type="string" calcext:value-type="string">
            <text:p>17 Crompton Street, Pinetown</text:p>
            <text:p> </text:p>
          </table:table-cell>
          <table:table-cell office:value-type="float" office:value="-29.8173714543057" calcext:value-type="float">
            <text:p>-29.8173714543057</text:p>
          </table:table-cell>
          <table:table-cell office:value-type="float" office:value="30.8602672521869" calcext:value-type="float">
            <text:p>30.8602672521869</text:p>
          </table:table-cell>
        </table:table-row>
        <table:table-row table:style-name="ro3">
          <table:table-cell office:value-type="string" calcext:value-type="string">
            <text:p>KZN</text:p>
          </table:table-cell>
          <table:table-cell office:value-type="string" calcext:value-type="string">
            <text:p>Sisonke</text:p>
          </table:table-cell>
          <table:table-cell office:value-type="string" calcext:value-type="string">
            <text:p>8 Main Street JY Building, Kokstad</text:p>
          </table:table-cell>
          <table:table-cell office:value-type="float" office:value="-30.5555296003512" calcext:value-type="float">
            <text:p>-30.5555296003512</text:p>
          </table:table-cell>
          <table:table-cell office:value-type="float" office:value="29.4299201259376" calcext:value-type="float">
            <text:p>29.4299201259376</text:p>
          </table:table-cell>
        </table:table-row>
        <table:table-row table:style-name="ro5">
          <table:table-cell office:value-type="string" calcext:value-type="string">
            <text:p>KZN</text:p>
          </table:table-cell>
          <table:table-cell office:value-type="string" calcext:value-type="string">
            <text:p>Ugu</text:p>
          </table:table-cell>
          <table:table-cell office:value-type="string" calcext:value-type="string">
            <text:p>46 Aiken Street, Absa Building Port, Shepstone</text:p>
          </table:table-cell>
          <table:table-cell office:value-type="float" office:value="-30.7374927643102" calcext:value-type="float">
            <text:p>-30.7374927643102</text:p>
          </table:table-cell>
          <table:table-cell office:value-type="float" office:value="30.4521780428234" calcext:value-type="float">
            <text:p>30.4521780428234</text:p>
          </table:table-cell>
        </table:table-row>
        <table:table-row table:style-name="ro5">
          <table:table-cell office:value-type="string" calcext:value-type="string">
            <text:p>KZN</text:p>
          </table:table-cell>
          <table:table-cell office:value-type="string" calcext:value-type="string">
            <text:p>Umgungundlovu</text:p>
          </table:table-cell>
          <table:table-cell office:value-type="string" calcext:value-type="string">
            <text:p>166 Loop Street Pietermaritzburg</text:p>
          </table:table-cell>
          <table:table-cell office:value-type="float" office:value="-29.6061446047638" calcext:value-type="float">
            <text:p>-29.6061446047638</text:p>
          </table:table-cell>
          <table:table-cell office:value-type="float" office:value="30.3783186257701" calcext:value-type="float">
            <text:p>30.3783186257701</text:p>
          </table:table-cell>
        </table:table-row>
        <table:table-row table:style-name="ro5">
          <table:table-cell office:value-type="string" calcext:value-type="string">
            <text:p>KZN</text:p>
          </table:table-cell>
          <table:table-cell office:value-type="string" calcext:value-type="string">
            <text:p>Umkhanyakude</text:p>
          </table:table-cell>
          <table:table-cell office:value-type="string" calcext:value-type="string">
            <text:p>Cnr of Thembalethu and Klebe Street ,Mkuze</text:p>
          </table:table-cell>
          <table:table-cell office:value-type="float" office:value="-27.6205908202513" calcext:value-type="float">
            <text:p>-27.6205908202513</text:p>
          </table:table-cell>
          <table:table-cell office:value-type="float" office:value="32.0392070575484" calcext:value-type="float">
            <text:p>32.0392070575484</text:p>
          </table:table-cell>
        </table:table-row>
        <table:table-row table:style-name="ro4">
          <table:table-cell office:value-type="string" calcext:value-type="string">
            <text:p>KZN</text:p>
          </table:table-cell>
          <table:table-cell office:value-type="string" calcext:value-type="string">
            <text:p>Umlazi</text:p>
          </table:table-cell>
          <table:table-cell office:value-type="string" calcext:value-type="string">
            <text:p>17 Victoria  and Embankment, Truso House Durban</text:p>
          </table:table-cell>
          <table:table-cell office:value-type="float" office:value="-29.8602651968785" calcext:value-type="float">
            <text:p>-29.8602651968785</text:p>
          </table:table-cell>
          <table:table-cell office:value-type="float" office:value="31.0329730173526" calcext:value-type="float">
            <text:p>31.0329730173526</text:p>
          </table:table-cell>
        </table:table-row>
        <table:table-row table:style-name="ro7">
          <table:table-cell office:value-type="string" calcext:value-type="string">
            <text:p>KZN</text:p>
          </table:table-cell>
          <table:table-cell office:value-type="string" calcext:value-type="string">
            <text:p>Umzinyathi</text:p>
          </table:table-cell>
          <table:table-cell office:value-type="string" calcext:value-type="string">
            <text:p>7 watt street Dundee</text:p>
          </table:table-cell>
          <table:table-cell office:value-type="float" office:value="-28.1681493533148" calcext:value-type="float">
            <text:p>-28.1681493533148</text:p>
          </table:table-cell>
          <table:table-cell office:value-type="float" office:value="30.2526179460787" calcext:value-type="float">
            <text:p>30.2526179460787</text:p>
          </table:table-cell>
        </table:table-row>
        <table:table-row table:style-name="ro3">
          <table:table-cell office:value-type="string" calcext:value-type="string">
            <text:p>KZN</text:p>
          </table:table-cell>
          <table:table-cell office:value-type="string" calcext:value-type="string">
            <text:p>Uthukela</text:p>
          </table:table-cell>
          <table:table-cell office:value-type="string" calcext:value-type="string">
            <text:p>49 Murchison Street,</text:p>
            <text:p>Ladysmit</text:p>
          </table:table-cell>
          <table:table-cell office:value-type="float" office:value="-28.5648268161234" calcext:value-type="float">
            <text:p>-28.5648268161234</text:p>
          </table:table-cell>
          <table:table-cell office:value-type="float" office:value="29.7763569533121" calcext:value-type="float">
            <text:p>29.7763569533121</text:p>
          </table:table-cell>
        </table:table-row>
        <table:table-row table:style-name="ro3">
          <table:table-cell office:value-type="string" calcext:value-type="string">
            <text:p>KZN</text:p>
          </table:table-cell>
          <table:table-cell office:value-type="string" calcext:value-type="string">
            <text:p>Zululand</text:p>
          </table:table-cell>
          <table:table-cell office:value-type="string" calcext:value-type="string">
            <text:p>Crn and West Street</text:p>
            <text:p>Vryheid</text:p>
          </table:table-cell>
          <table:table-cell office:value-type="float" office:value="-27.7801467212932" calcext:value-type="float">
            <text:p>-27.7801467212932</text:p>
          </table:table-cell>
          <table:table-cell office:value-type="float" office:value="30.7867784014738" calcext:value-type="float">
            <text:p>30.7867784014738</text:p>
          </table:table-cell>
        </table:table-row>
        <table:table-row table:style-name="ro5">
          <table:table-cell office:value-type="string" calcext:value-type="string">
            <text:p>KZN</text:p>
          </table:table-cell>
          <table:table-cell office:value-type="string" calcext:value-type="string">
            <text:p>Uthungulu</text:p>
          </table:table-cell>
          <table:table-cell office:value-type="string" calcext:value-type="string">
            <text:p>Cnr Maxwell Str &amp; Hancock Avenue, Empangeni </text:p>
          </table:table-cell>
          <table:table-cell office:value-type="float" office:value="-28.7420537062157" calcext:value-type="float">
            <text:p>-28.7420537062157</text:p>
          </table:table-cell>
          <table:table-cell office:value-type="float" office:value="31.8915341233837" calcext:value-type="float">
            <text:p>31.8915341233837</text:p>
          </table:table-cell>
        </table:table-row>
        <table:table-row table:style-name="ro5">
          <table:table-cell table:style-name="ce2" office:value-type="string" calcext:value-type="string">
            <text:p>Limpopo</text:p>
          </table:table-cell>
          <table:table-cell table:style-name="ce5" office:value-type="string" calcext:value-type="string">
            <text:p>Head Office</text:p>
          </table:table-cell>
          <table:table-cell table:style-name="ce5" office:value-type="string" calcext:value-type="string">
            <text:p>cnr Biccard and Excelsior</text:p>
            <text:p>Street, Polokwane</text:p>
          </table:table-cell>
          <table:table-cell table:style-name="ce14" office:value-type="float" office:value="-23.8996291363444" calcext:value-type="float">
            <text:p>-23.8996291363444</text:p>
          </table:table-cell>
          <table:table-cell table:style-name="ce14" office:value-type="float" office:value="29.4541163816246" calcext:value-type="float">
            <text:p>29.4541163816246</text:p>
          </table:table-cell>
        </table:table-row>
        <table:table-row table:style-name="ro5">
          <table:table-cell office:value-type="string" calcext:value-type="string">
            <text:p>Limpopo</text:p>
          </table:table-cell>
          <table:table-cell office:value-type="string" calcext:value-type="string">
            <text:p>Sekhukhune – Capricorn</text:p>
            <text:p>South</text:p>
          </table:table-cell>
          <table:table-cell office:value-type="string" calcext:value-type="string">
            <text:p>Lebowakgomo Parliament</text:p>
            <text:p>Building First Floor</text:p>
          </table:table-cell>
          <table:table-cell office:value-type="float" office:value="-24.305265799258" calcext:value-type="float">
            <text:p>-24.305265799258</text:p>
          </table:table-cell>
          <table:table-cell office:value-type="float" office:value="29.4810441582086" calcext:value-type="float">
            <text:p>29.4810441582086</text:p>
          </table:table-cell>
        </table:table-row>
        <table:table-row table:style-name="ro5">
          <table:table-cell office:value-type="string" calcext:value-type="string">
            <text:p>Limpopo</text:p>
          </table:table-cell>
          <table:table-cell table:style-name="ce9" office:value-type="string" calcext:value-type="string">
            <text:p>Capricorn</text:p>
            <text:p>Ladana</text:p>
          </table:table-cell>
          <table:table-cell office:value-type="string" calcext:value-type="string">
            <text:p>Old Parliament Building</text:p>
            <text:p>Lebowakgomo</text:p>
          </table:table-cell>
          <table:table-cell office:value-type="float" office:value="-24.305265799258" calcext:value-type="float">
            <text:p>-24.305265799258</text:p>
          </table:table-cell>
          <table:table-cell office:value-type="float" office:value="29.4810441582086" calcext:value-type="float">
            <text:p>29.4810441582086</text:p>
          </table:table-cell>
        </table:table-row>
        <table:table-row table:style-name="ro5">
          <table:table-cell office:value-type="string" calcext:value-type="string">
            <text:p>Limpopo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Old Parliament Building</text:p>
            <text:p>Lebowakgomo</text:p>
          </table:table-cell>
          <table:table-cell office:value-type="float" office:value="-24.305265799258" calcext:value-type="float">
            <text:p>-24.305265799258</text:p>
          </table:table-cell>
          <table:table-cell office:value-type="float" office:value="29.4810441582086" calcext:value-type="float">
            <text:p>29.4810441582086</text:p>
          </table:table-cell>
        </table:table-row>
        <table:table-row table:style-name="ro4">
          <table:table-cell office:value-type="string" calcext:value-type="string">
            <text:p>Limpopo</text:p>
          </table:table-cell>
          <table:table-cell office:value-type="string" calcext:value-type="string">
            <text:p>Sekhukhune</text:p>
          </table:table-cell>
          <table:table-cell office:value-type="string" calcext:value-type="string">
            <text:p>Government Offices</text:p>
            <text:p>Sekhukhune Education</text:p>
            <text:p>District</text:p>
          </table:table-cell>
          <table:table-cell office:value-type="float" office:value="-24.8175637291767" calcext:value-type="float">
            <text:p>-24.8175637291767</text:p>
          </table:table-cell>
          <table:table-cell office:value-type="float" office:value="29.9417525858155" calcext:value-type="float">
            <text:p>29.9417525858155</text:p>
          </table:table-cell>
        </table:table-row>
        <table:table-row table:style-name="ro4">
          <table:table-cell office:value-type="string" calcext:value-type="string">
            <text:p>Limpopo</text:p>
          </table:table-cell>
          <table:table-cell office:value-type="string" calcext:value-type="string">
            <text:p>Vhembe East</text:p>
          </table:table-cell>
          <table:table-cell office:value-type="string" calcext:value-type="string">
            <text:p>Old Parliament</text:p>
            <text:p>Next to Khoroni</text:p>
            <text:p> </text:p>
          </table:table-cell>
          <table:table-cell office:value-type="float" office:value="-22.9681626188132" calcext:value-type="float">
            <text:p>-22.9681626188132</text:p>
          </table:table-cell>
          <table:table-cell office:value-type="float" office:value="30.4576388911424" calcext:value-type="float">
            <text:p>30.4576388911424</text:p>
          </table:table-cell>
        </table:table-row>
        <table:table-row table:style-name="ro4">
          <table:table-cell table:style-name="ce4" office:value-type="string" calcext:value-type="string">
            <text:p>Limpopo</text:p>
          </table:table-cell>
          <table:table-cell office:value-type="string" calcext:value-type="string">
            <text:p>Tshipise Sagole-Vhembe</text:p>
            <text:p>West (Mutale)</text:p>
          </table:table-cell>
          <table:table-cell office:value-type="string" calcext:value-type="string">
            <text:p>Old Parliament Next to</text:p>
            <text:p>Khoroni, Block D, Sibasa</text:p>
          </table:table-cell>
          <table:table-cell table:style-name="ce16" office:value-type="float" office:value="-22.9681626188132" calcext:value-type="float">
            <text:p>-22.9681626188132</text:p>
          </table:table-cell>
          <table:table-cell table:style-name="ce16" office:value-type="float" office:value="30.4576388911424" calcext:value-type="float">
            <text:p>30.4576388911424</text:p>
          </table:table-cell>
        </table:table-row>
        <table:table-row table:style-name="ro5">
          <table:table-cell office:value-type="string" calcext:value-type="string">
            <text:p>Limpopo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100 Nelson Mandela Drive, Modimolle</text:p>
          </table:table-cell>
          <table:table-cell office:value-type="float" office:value="-24.7005665090879" calcext:value-type="float">
            <text:p>-24.7005665090879</text:p>
          </table:table-cell>
          <table:table-cell office:value-type="float" office:value="28.4060354376248" calcext:value-type="float">
            <text:p>28.4060354376248</text:p>
          </table:table-cell>
        </table:table-row>
        <table:table-row table:style-name="ro4">
          <table:table-cell office:value-type="string" calcext:value-type="string">
            <text:p>Limpopo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805 Rufus Seakamel,</text:p>
            <text:p>Street Mokopane</text:p>
            <text:p>Mahwelereng</text:p>
          </table:table-cell>
          <table:table-cell office:value-type="float" office:value="-24.1484254923029" calcext:value-type="float">
            <text:p>-24.1484254923029</text:p>
          </table:table-cell>
          <table:table-cell office:value-type="float" office:value="28.9917885376341" calcext:value-type="float">
            <text:p>28.9917885376341</text:p>
          </table:table-cell>
        </table:table-row>
        <table:table-row table:style-name="ro4">
          <table:table-cell office:value-type="string" calcext:value-type="string">
            <text:p>Limpopo</text:p>
          </table:table-cell>
          <table:table-cell office:value-type="string" calcext:value-type="string">
            <text:p>Mopani East</text:p>
          </table:table-cell>
          <table:table-cell office:value-type="string" calcext:value-type="string">
            <text:p>Old Parliament Building</text:p>
            <text:p>Giyani Main Road</text:p>
          </table:table-cell>
          <table:table-cell office:value-type="float" office:value="-23.3126089979722" calcext:value-type="float">
            <text:p>-23.3126089979722</text:p>
          </table:table-cell>
          <table:table-cell office:value-type="float" office:value="30.712389692416" calcext:value-type="float">
            <text:p>30.712389692416</text:p>
          </table:table-cell>
        </table:table-row>
        <table:table-row table:style-name="ro4">
          <table:table-cell office:value-type="string" calcext:value-type="string">
            <text:p>Limpopo</text:p>
          </table:table-cell>
          <table:table-cell office:value-type="string" calcext:value-type="string">
            <text:p>Mopani</text:p>
            <text:p>West</text:p>
          </table:table-cell>
          <table:table-cell office:value-type="string" calcext:value-type="string">
            <text:p>27 Peace Street, Prosperities building, Tzaneen</text:p>
          </table:table-cell>
          <table:table-cell office:value-type="float" office:value="-23.8295208729621" calcext:value-type="float">
            <text:p>-23.8295208729621</text:p>
          </table:table-cell>
          <table:table-cell office:value-type="float" office:value="30.1593550817952" calcext:value-type="float">
            <text:p>30.1593550817952</text:p>
          </table:table-cell>
        </table:table-row>
        <table:table-row table:style-name="ro5">
          <table:table-cell office:value-type="string" calcext:value-type="string">
            <text:p>Limpopo</text:p>
          </table:table-cell>
          <table:table-cell office:value-type="string" calcext:value-type="string">
            <text:p>Riba Cross</text:p>
          </table:table-cell>
          <table:table-cell office:value-type="string" calcext:value-type="string">
            <text:p>Aloe Street , Next to Old Mutual, Riba Cross </text:p>
          </table:table-cell>
          <table:table-cell office:value-type="float" office:value="-24.763734056619" calcext:value-type="float">
            <text:p>-24.763734056619</text:p>
          </table:table-cell>
          <table:table-cell office:value-type="float" office:value="30.0669909741833" calcext:value-type="float">
            <text:p>30.0669909741833</text:p>
          </table:table-cell>
        </table:table-row>
        <table:table-row table:style-name="ro4">
          <table:table-cell table:style-name="ce2" office:value-type="string" calcext:value-type="string">
            <text:p>Mpumalanga</text:p>
          </table:table-cell>
          <table:table-cell table:style-name="ce5" office:value-type="string" calcext:value-type="string">
            <text:p>Head</text:p>
            <text:p>Office</text:p>
          </table:table-cell>
          <table:table-cell table:style-name="ce5" office:value-type="string" calcext:value-type="string">
            <text:p>Riverside Government Complex, Building NO.5</text:p>
            <text:p>Nelspruit</text:p>
          </table:table-cell>
          <table:table-cell table:style-name="ce12" office:value-type="float" office:value="-25.4359842577092" calcext:value-type="float">
            <text:p>-25.4359842577092</text:p>
          </table:table-cell>
          <table:table-cell table:style-name="ce12" office:value-type="float" office:value="30.9714309657062" calcext:value-type="float">
            <text:p>30.9714309657062</text:p>
          </table:table-cell>
        </table:table-row>
        <table:table-row table:style-name="ro5">
          <table:table-cell office:value-type="string" calcext:value-type="string">
            <text:p>Mpumalanga</text:p>
          </table:table-cell>
          <table:table-cell office:value-type="string" calcext:value-type="string">
            <text:p>Ehlanzeni</text:p>
          </table:table-cell>
          <table:table-cell table:style-name="ce11" office:value-type="string" calcext:value-type="string">
            <text:p>Old Mgwenya college</text:p>
            <text:p>Kanyamazane</text:p>
            <text:p> </text:p>
          </table:table-cell>
          <table:table-cell office:value-type="float" office:value="-25.4779312653925" calcext:value-type="float">
            <text:p>-25.4779312653925</text:p>
          </table:table-cell>
          <table:table-cell office:value-type="float" office:value="31.1731482807767" calcext:value-type="float">
            <text:p>31.1731482807767</text:p>
          </table:table-cell>
        </table:table-row>
        <table:table-row table:style-name="ro6">
          <table:table-cell office:value-type="string" calcext:value-type="string">
            <text:p>Mpumalang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Building 5 ,Government</text:p>
            <text:p>Complex ,Department of</text:p>
            <text:p>Education, Kwamhlanga</text:p>
          </table:table-cell>
          <table:table-cell office:value-type="float" office:value="-25.4355326019743" calcext:value-type="float">
            <text:p>-25.4355326019743</text:p>
          </table:table-cell>
          <table:table-cell office:value-type="float" office:value="28.7043845155229" calcext:value-type="float">
            <text:p>28.7043845155229</text:p>
          </table:table-cell>
        </table:table-row>
        <table:table-row table:style-name="ro3">
          <table:table-cell office:value-type="string" calcext:value-type="string">
            <text:p>Mpumalanga</text:p>
          </table:table-cell>
          <table:table-cell office:value-type="string" calcext:value-type="string">
            <text:p>Gert Sibande-Bohlabela</text:p>
          </table:table-cell>
          <table:table-cell office:value-type="string" calcext:value-type="string">
            <text:p>2 De Jager Street</text:p>
            <text:p>Ermelo</text:p>
          </table:table-cell>
          <table:table-cell office:value-type="float" office:value="-26.5249703700289" calcext:value-type="float">
            <text:p>-26.5249703700289</text:p>
          </table:table-cell>
          <table:table-cell office:value-type="float" office:value="29.9895157642554" calcext:value-type="float">
            <text:p>29.9895157642554</text:p>
          </table:table-cell>
        </table:table-row>
        <table:table-row table:style-name="ro4">
          <table:table-cell table:style-name="ce2" office:value-type="string" calcext:value-type="string">
            <text:p>North West</text:p>
          </table:table-cell>
          <table:table-cell table:style-name="ce7" office:value-type="string" calcext:value-type="string">
            <text:p>Head Office</text:p>
          </table:table-cell>
          <table:table-cell table:style-name="ce7" office:value-type="string" calcext:value-type="string">
            <text:p>1st Floor Garona</text:p>
            <text:p>Building, East Wing Mmabatho</text:p>
          </table:table-cell>
          <table:table-cell table:style-name="ce14" office:value-type="float" office:value="-25.8310919222595" calcext:value-type="float">
            <text:p>-25.8310919222595</text:p>
          </table:table-cell>
          <table:table-cell table:style-name="ce14" office:value-type="float" office:value="25.6110218673408" calcext:value-type="float">
            <text:p>25.6110218673408</text:p>
          </table:table-cell>
        </table:table-row>
        <table:table-row table:style-name="ro5">
          <table:table-cell table:style-name="ce2" office:value-type="string" calcext:value-type="string">
            <text:p>North West</text:p>
          </table:table-cell>
          <table:table-cell table:style-name="ce7" office:value-type="string" calcext:value-type="string">
            <text:p>Regional Office</text:p>
          </table:table-cell>
          <table:table-cell table:style-name="ce7" office:value-type="string" calcext:value-type="string">
            <text:p>Block C Old Mmabatho High, Hostels Building</text:p>
          </table:table-cell>
          <table:table-cell table:style-name="ce14" office:value-type="float" office:value="-25.8310919222595" calcext:value-type="float">
            <text:p>-25.8310919222595</text:p>
          </table:table-cell>
          <table:table-cell table:style-name="ce14" office:value-type="float" office:value="25.6110218673408" calcext:value-type="float">
            <text:p>25.6110218673408</text:p>
          </table:table-cell>
        </table:table-row>
        <table:table-row table:style-name="ro5">
          <table:table-cell office:value-type="string" calcext:value-type="string">
            <text:p>North West</text:p>
          </table:table-cell>
          <table:table-cell office:value-type="string" calcext:value-type="string">
            <text:p>Bojanala District</text:p>
          </table:table-cell>
          <table:table-cell office:value-type="string" calcext:value-type="string">
            <text:p>Cnr Klopper St &amp; Oliver Tambo Dr, Rustenburg</text:p>
          </table:table-cell>
          <table:table-cell office:value-type="float" office:value="-25.6757361756638" calcext:value-type="float">
            <text:p>-25.6757361756638</text:p>
          </table:table-cell>
          <table:table-cell office:value-type="float" office:value="27.2420733957168" calcext:value-type="float">
            <text:p>27.2420733957168</text:p>
          </table:table-cell>
        </table:table-row>
        <table:table-row table:style-name="ro5">
          <table:table-cell office:value-type="string" calcext:value-type="string">
            <text:p>North West</text:p>
          </table:table-cell>
          <table:table-cell office:value-type="string" calcext:value-type="string">
            <text:p>Dr Kenneth</text:p>
            <text:p>Kaunda</text:p>
            <text:p>District</text:p>
          </table:table-cell>
          <table:table-cell office:value-type="string" calcext:value-type="string">
            <text:p>08 O.R. Tambo, Street, Potchefstroom</text:p>
          </table:table-cell>
          <table:table-cell office:value-type="float" office:value="-26.71201164734" calcext:value-type="float">
            <text:p>-26.71201164734</text:p>
          </table:table-cell>
          <table:table-cell office:value-type="float" office:value="27.0954944261809" calcext:value-type="float">
            <text:p>27.0954944261809</text:p>
          </table:table-cell>
        </table:table-row>
        <table:table-row table:style-name="ro4">
          <table:table-cell office:value-type="string" calcext:value-type="string">
            <text:p>North West</text:p>
          </table:table-cell>
          <table:table-cell office:value-type="string" calcext:value-type="string">
            <text:p>DR Ruth</text:p>
            <text:p>S. Mompati</text:p>
            <text:p>District</text:p>
          </table:table-cell>
          <table:table-cell office:value-type="string" calcext:value-type="string">
            <text:p>Mini Garona Building</text:p>
            <text:p>Cnr Noord and Molopo Road, Vryburg</text:p>
          </table:table-cell>
          <table:table-cell office:value-type="float" office:value="-26.9489247333035" calcext:value-type="float">
            <text:p>-26.9489247333035</text:p>
          </table:table-cell>
          <table:table-cell office:value-type="float" office:value="24.7243798091584" calcext:value-type="float">
            <text:p>24.7243798091584</text:p>
          </table:table-cell>
        </table:table-row>
        <table:table-row table:style-name="ro4">
          <table:table-cell office:value-type="string" calcext:value-type="string">
            <text:p>North West</text:p>
          </table:table-cell>
          <table:table-cell office:value-type="string" calcext:value-type="string">
            <text:p>Ngaka Modiri</text:p>
            <text:p>Molema</text:p>
          </table:table-cell>
          <table:table-cell office:value-type="string" calcext:value-type="string">
            <text:p>10 nelson Mandela, Drive, Piet Hugo bldg, Mmabatho </text:p>
          </table:table-cell>
          <table:table-cell office:value-type="float" office:value="-25.8569986321508" calcext:value-type="float">
            <text:p>-25.8569986321508</text:p>
          </table:table-cell>
          <table:table-cell office:value-type="float" office:value="25.6408465650845" calcext:value-type="float">
            <text:p>25.6408465650845</text:p>
          </table:table-cell>
        </table:table-row>
        <table:table-row table:style-name="ro5">
          <table:table-cell table:style-name="ce2" office:value-type="string" calcext:value-type="string">
            <text:p>Northern Cape</text:p>
          </table:table-cell>
          <table:table-cell table:style-name="ce7" office:value-type="string" calcext:value-type="string">
            <text:p>Head Office</text:p>
          </table:table-cell>
          <table:table-cell table:style-name="ce7" office:value-type="string" calcext:value-type="string">
            <text:p>156 Barkly Road</text:p>
            <text:p>Kimberly</text:p>
            <text:p> </text:p>
          </table:table-cell>
          <table:table-cell table:style-name="ce14" office:value-type="float" office:value="-28.7117411144697" calcext:value-type="float">
            <text:p>-28.7117411144697</text:p>
          </table:table-cell>
          <table:table-cell table:style-name="ce14" office:value-type="float" office:value="24.7507834302617" calcext:value-type="float">
            <text:p>24.7507834302617</text:p>
          </table:table-cell>
        </table:table-row>
        <table:table-row table:style-name="ro4">
          <table:table-cell office:value-type="string" calcext:value-type="string">
            <text:p>Northern Cape</text:p>
          </table:table-cell>
          <table:table-cell office:value-type="string" calcext:value-type="string">
            <text:p>Namaqua</text:p>
            <text:p>District</text:p>
          </table:table-cell>
          <table:table-cell office:value-type="string" calcext:value-type="string">
            <text:p>Corner of Phillip and</text:p>
            <text:p>Breë Street Springbok</text:p>
            <text:p> </text:p>
          </table:table-cell>
          <table:table-cell office:value-type="float" office:value="-29.6457049669952" calcext:value-type="float">
            <text:p>-29.6457049669952</text:p>
          </table:table-cell>
          <table:table-cell office:value-type="float" office:value="17.8800089271003" calcext:value-type="float">
            <text:p>17.8800089271003</text:p>
          </table:table-cell>
        </table:table-row>
        <table:table-row table:style-name="ro4">
          <table:table-cell office:value-type="string" calcext:value-type="string">
            <text:p>Northern Cape</text:p>
          </table:table-cell>
          <table:table-cell office:value-type="string" calcext:value-type="string">
            <text:p>Pixley Ka Seme</text:p>
          </table:table-cell>
          <table:table-cell office:value-type="string" calcext:value-type="string">
            <text:p>Alpha Street,Orion</text:p>
            <text:p>Building, De Aar,</text:p>
            <text:p> </text:p>
          </table:table-cell>
          <table:table-cell office:value-type="float" office:value="-30.6498189279495" calcext:value-type="float">
            <text:p>-30.6498189279495</text:p>
          </table:table-cell>
          <table:table-cell office:value-type="float" office:value="24.0284038576711" calcext:value-type="float">
            <text:p>24.0284038576711</text:p>
          </table:table-cell>
        </table:table-row>
        <table:table-row table:style-name="ro5">
          <table:table-cell office:value-type="string" calcext:value-type="string">
            <text:p>Northern Cape</text:p>
          </table:table-cell>
          <table:table-cell office:value-type="string" calcext:value-type="string">
            <text:p>Frances Baard</text:p>
          </table:table-cell>
          <table:table-cell office:value-type="string" calcext:value-type="string">
            <text:p>9 Hayston Road Hadison Park, Kimberley</text:p>
          </table:table-cell>
          <table:table-cell office:value-type="float" office:value="-28.7537393979017" calcext:value-type="float">
            <text:p>-28.7537393979017</text:p>
          </table:table-cell>
          <table:table-cell office:value-type="float" office:value="24.7494985770743" calcext:value-type="float">
            <text:p>24.7494985770743</text:p>
          </table:table-cell>
        </table:table-row>
        <table:table-row table:style-name="ro5">
          <table:table-cell office:value-type="string" calcext:value-type="string">
            <text:p>Northern Cape</text:p>
          </table:table-cell>
          <table:table-cell office:value-type="string" calcext:value-type="string">
            <text:p>John Taolo</text:p>
            <text:p>Gaetsewe</text:p>
          </table:table-cell>
          <table:table-cell office:value-type="string" calcext:value-type="string">
            <text:p>6164 Kgosi Mothibi</text:p>
            <text:p>Road Mothibistad</text:p>
          </table:table-cell>
          <table:table-cell office:value-type="float" office:value="-27.3976687492461" calcext:value-type="float">
            <text:p>-27.3976687492461</text:p>
          </table:table-cell>
          <table:table-cell office:value-type="float" office:value="23.4827031821823" calcext:value-type="float">
            <text:p>23.4827031821823</text:p>
          </table:table-cell>
        </table:table-row>
        <table:table-row table:style-name="ro5">
          <table:table-cell office:value-type="string" calcext:value-type="string">
            <text:p>Northern Cape</text:p>
          </table:table-cell>
          <table:table-cell office:value-type="string" calcext:value-type="string">
            <text:p>Siyanda-ZF Mgcawu</text:p>
          </table:table-cell>
          <table:table-cell office:value-type="string" calcext:value-type="string">
            <text:p>2 JG Smith Street Progress, Upington</text:p>
          </table:table-cell>
          <table:table-cell office:value-type="float" office:value="-28.4613555419709" calcext:value-type="float">
            <text:p>-28.4613555419709</text:p>
          </table:table-cell>
          <table:table-cell office:value-type="float" office:value="21.2155640948029" calcext:value-type="float">
            <text:p>21.2155640948029</text:p>
          </table:table-cell>
        </table:table-row>
        <table:table-row table:style-name="ro5">
          <table:table-cell table:style-name="ce2" office:value-type="string" calcext:value-type="string">
            <text:p>Western Cape</text:p>
          </table:table-cell>
          <table:table-cell table:style-name="ce5" office:value-type="string" calcext:value-type="string">
            <text:p>Head Office</text:p>
          </table:table-cell>
          <table:table-cell table:style-name="ce5" office:value-type="string" calcext:value-type="string">
            <text:p>14 Angelier Street</text:p>
            <text:p>Protea Hoogte Brackenfell</text:p>
          </table:table-cell>
          <table:table-cell table:style-name="ce12" office:value-type="float" office:value="-33.9168772890748" calcext:value-type="float">
            <text:p>-33.9168772890748</text:p>
          </table:table-cell>
          <table:table-cell table:style-name="ce12" office:value-type="float" office:value="18.4249207960003" calcext:value-type="float">
            <text:p>18.4249207960003</text:p>
          </table:table-cell>
        </table:table-row>
        <table:table-row table:style-name="ro2">
          <table:table-cell office:value-type="string" calcext:value-type="string">
            <text:p>Western Cape</text:p>
          </table:table-cell>
          <table:table-cell office:value-type="string" calcext:value-type="string">
            <text:p>Overberg</text:p>
          </table:table-cell>
          <table:table-cell office:value-type="string" calcext:value-type="string">
            <text:p>Lower Parliament Street Grand Central 9th Floor Cape Town</text:p>
          </table:table-cell>
          <table:table-cell office:value-type="float" office:value="-33.9237536294268" calcext:value-type="float">
            <text:p>-33.9237536294268</text:p>
          </table:table-cell>
          <table:table-cell office:value-type="float" office:value="18.4256370884648" calcext:value-type="float">
            <text:p>18.4256370884648</text:p>
          </table:table-cell>
        </table:table-row>
        <table:table-row table:style-name="ro4">
          <table:table-cell office:value-type="string" calcext:value-type="string">
            <text:p>Western Cape</text:p>
          </table:table-cell>
          <table:table-cell office:value-type="string" calcext:value-type="string">
            <text:p>Metro East</text:p>
          </table:table-cell>
          <table:table-cell office:value-type="string" calcext:value-type="string">
            <text:p>Cnr of Belhar and</text:p>
            <text:p>Nooiensfontein Road,Kuils River</text:p>
          </table:table-cell>
          <table:table-cell office:value-type="float" office:value="-33.9408893082102" calcext:value-type="float">
            <text:p>-33.9408893082102</text:p>
          </table:table-cell>
          <table:table-cell office:value-type="float" office:value="18.678867165273" calcext:value-type="float">
            <text:p>18.678867165273</text:p>
          </table:table-cell>
        </table:table-row>
        <table:table-row table:style-name="ro7">
          <table:table-cell office:value-type="string" calcext:value-type="string">
            <text:p>Western Cape</text:p>
          </table:table-cell>
          <table:table-cell office:value-type="string" calcext:value-type="string">
            <text:p>Eden/Karoo</text:p>
          </table:table-cell>
          <table:table-cell office:value-type="string" calcext:value-type="string">
            <text:p>42 Courtney Street George</text:p>
          </table:table-cell>
          <table:table-cell office:value-type="float" office:value="-33.9574079575839" calcext:value-type="float">
            <text:p>-33.9574079575839</text:p>
          </table:table-cell>
          <table:table-cell office:value-type="float" office:value="22.4642295119871" calcext:value-type="float">
            <text:p>22.4642295119871</text:p>
          </table:table-cell>
        </table:table-row>
        <table:table-row table:style-name="ro7">
          <table:table-cell office:value-type="string" calcext:value-type="string">
            <text:p>Western Cape</text:p>
          </table:table-cell>
          <table:table-cell office:value-type="string" calcext:value-type="string">
            <text:p>Cape Winelands</text:p>
          </table:table-cell>
          <table:table-cell office:value-type="string" calcext:value-type="string">
            <text:p>Durban Street Worcester</text:p>
          </table:table-cell>
          <table:table-cell office:value-type="float" office:value="-33.6437710823622" calcext:value-type="float">
            <text:p>-33.6437710823622</text:p>
          </table:table-cell>
          <table:table-cell office:value-type="float" office:value="19.4547926461853" calcext:value-type="float">
            <text:p>19.4547926461853</text:p>
          </table:table-cell>
        </table:table-row>
        <table:table-row table:style-name="ro6">
          <table:table-cell office:value-type="string" calcext:value-type="string">
            <text:p>Western Cape</text:p>
          </table:table-cell>
          <table:table-cell office:value-type="string" calcext:value-type="string">
            <text:p>Metro Central</text:p>
          </table:table-cell>
          <table:table-cell office:value-type="string" calcext:value-type="string">
            <text:p>Gatehouse 2, Alexandra Provincial Office, Present and Haven Road Maitland</text:p>
          </table:table-cell>
          <table:table-cell office:value-type="float" office:value="-33.9310091332825" calcext:value-type="float">
            <text:p>-33.9310091332825</text:p>
          </table:table-cell>
          <table:table-cell office:value-type="float" office:value="18.4816637798066" calcext:value-type="float">
            <text:p>18.4816637798066</text:p>
          </table:table-cell>
        </table:table-row>
        <table:table-row table:style-name="ro7">
          <table:table-cell office:value-type="string" calcext:value-type="string">
            <text:p>Western Cape</text:p>
          </table:table-cell>
          <table:table-cell office:value-type="string" calcext:value-type="string">
            <text:p>Metro-North</text:p>
          </table:table-cell>
          <table:table-cell office:value-type="string" calcext:value-type="string">
            <text:p>9 Timmerman Street Parow</text:p>
          </table:table-cell>
          <table:table-cell office:value-type="float" office:value="-33.898615184066" calcext:value-type="float">
            <text:p>-33.898615184066</text:p>
          </table:table-cell>
          <table:table-cell office:value-type="float" office:value="18.5893631727353" calcext:value-type="float">
            <text:p>18.5893631727353</text:p>
          </table:table-cell>
        </table:table-row>
        <table:table-row table:style-name="ro4">
          <table:table-cell office:value-type="string" calcext:value-type="string">
            <text:p>Western Cape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Jack Meyer Art Center 6 Hospital Street Paarl</text:p>
            <text:p> </text:p>
          </table:table-cell>
          <table:table-cell office:value-type="float" office:value="-33.7263102844666" calcext:value-type="float">
            <text:p>-33.7263102844666</text:p>
          </table:table-cell>
          <table:table-cell office:value-type="float" office:value="18.9660381715117" calcext:value-type="float">
            <text:p>18.9660381715117</text:p>
          </table:table-cell>
        </table:table-row>
        <table:table-row table:style-name="ro5">
          <table:table-cell office:value-type="string" calcext:value-type="string">
            <text:p>Western Cape</text:p>
          </table:table-cell>
          <table:table-cell office:value-type="string" calcext:value-type="string">
            <text:p>Metro-South</text:p>
          </table:table-cell>
          <table:table-cell office:value-type="string" calcext:value-type="string">
            <text:p>AZ Berman Drive</text:p>
            <text:p>Lentegeur Mitchells Plan</text:p>
          </table:table-cell>
          <table:table-cell office:value-type="float" office:value="-34.0241448489208" calcext:value-type="float">
            <text:p>-34.0241448489208</text:p>
          </table:table-cell>
          <table:table-cell office:value-type="float" office:value="18.609546601995" calcext:value-type="float">
            <text:p>18.6095466019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Inter" svg:font-family="Inte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£</number:text>
      <number:fill-character> </number:fill-character>
      <number:text loext:blank-width-char="-1">-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">
      <number:number number:decimal-places="3" number:min-decimal-places="3" number:min-integer-digits="1"/>
    </number:number-style>
    <number:number-style style:name="N137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6T20:36:00.545267667</meta:creation-date>
    <dc:date>2026-06-16T20:37:48.188594594</dc:date>
    <meta:editing-duration>PT1M48S</meta:editing-duration>
    <meta:editing-cycles>1</meta:editing-cycles>
    <meta:document-statistic meta:table-count="1" meta:cell-count="513" meta:object-count="0"/>
    <meta:generator>LibreOffice/26.2.2.2$Linux_X86_64 LibreOffice_project/620$Build-2</meta:generator>
  </office:meta>
</office:document-meta>
</file>