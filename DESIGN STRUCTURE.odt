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3000001FB6E1A1546.png" manifest:media-type="image/png"/>
  <manifest:file-entry manifest:full-path="Pictures/10000001000000F6000000AE7A2417F7.png" manifest:media-type="image/png"/>
  <manifest:file-entry manifest:full-path="Pictures/10000001000000E30000017FE13B3805.png" manifest:media-type="image/png"/>
  <manifest:file-entry manifest:full-path="Pictures/10000001000000F3000000B311E0E5D4.png" manifest:media-type="image/png"/>
  <manifest:file-entry manifest:full-path="Pictures/10000001000000D9000000B5471B193B.png" manifest:media-type="image/png"/>
  <manifest:file-entry manifest:full-path="Pictures/10000001000000D5000002008B0D1A28.png" manifest:media-type="image/png"/>
  <manifest:file-entry manifest:full-path="Pictures/10000001000000DE000002124F3C9A51.png" manifest:media-type="image/png"/>
  <manifest:file-entry manifest:full-path="Pictures/10000001000000F4000001E3698E9C2C.png" manifest:media-type="image/png"/>
  <manifest:file-entry manifest:full-path="Pictures/10000001000000F1000001F8F0B03518.png" manifest:media-type="image/png"/>
  <manifest:file-entry manifest:full-path="Pictures/100000010000011D000002191CFBB983.png" manifest:media-type="image/png"/>
  <manifest:file-entry manifest:full-path="Pictures/10000001000000EB000000FFE7DD7A2C.png" manifest:media-type="image/png"/>
  <manifest:file-entry manifest:full-path="Pictures/10000001000000D500000200031179AC.png" manifest:media-type="image/png"/>
  <manifest:file-entry manifest:full-path="Pictures/10000001000000C9000001A48693B9F1.png" manifest:media-type="image/png"/>
  <manifest:file-entry manifest:full-path="Pictures/10000001000000EA00000071A6506D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278" officeooo:paragraph-rsid="000cf278"/>
    </style:style>
    <style:style style:name="P2" style:family="paragraph" style:parent-style-name="Standard">
      <style:text-properties officeooo:rsid="000cf77f" officeooo:paragraph-rsid="000cf77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STRUCTURE</text:p>
      <text:p text:style-name="P1"><draw:frame draw:style-name="fr1" draw:name="Image1" text:anchor-type="char" svg:width="6.006cm" svg:height="13.414cm" draw:z-index="0"><draw:image xlink:href="Pictures/10000001000000E3000001FB6E1A1546.png" xlink:type="simple" xlink:show="embed" xlink:actuate="onLoad" draw:mime-type="image/png"/></draw:frame></text:p>
      <text:p text:style-name="P1">PUBLIC</text:p>
      <text:p text:style-name="P1"/>
      <text:p text:style-name="P1"><draw:frame draw:style-name="fr2" draw:name="Image2" text:anchor-type="char" svg:width="5.741cm" svg:height="4.789cm" draw:z-index="1"><draw:image xlink:href="Pictures/10000001000000D9000000B5471B19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S &amp; IMAGES</text:p>
      <text:p text:style-name="P1"><draw:frame draw:style-name="fr3" draw:name="Image6" text:anchor-type="char" svg:width="5.874cm" svg:height="14.023cm" draw:z-index="5"><draw:image xlink:href="Pictures/10000001000000DE000002124F3C9A51.png" xlink:type="simple" xlink:show="embed" xlink:actuate="onLoad" draw:mime-type="image/png"/></draw:frame><text:soft-page-break/></text:p>
      <text:p text:style-name="P1">SRC</text:p>
      <text:p text:style-name="P1"><draw:frame draw:style-name="fr3" draw:name="Image3" text:anchor-type="char" svg:width="6.456cm" svg:height="12.779cm" draw:z-index="2"><draw:image xlink:href="Pictures/10000001000000F4000001E3698E9C2C.png" xlink:type="simple" xlink:show="embed" xlink:actuate="onLoad" draw:mime-type="image/png"/></draw:frame><text:soft-page-break/></text:p>
      <text:p text:style-name="P1"><draw:frame draw:style-name="fr2" draw:name="Image4" text:anchor-type="char" svg:width="6.509cm" svg:height="4.604cm" draw:z-index="3"><draw:image xlink:href="Pictures/10000001000000F6000000AE7A2417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OOKS / INTEGRATIONS / LIBS</text:p>
      <text:p text:style-name="P1"><draw:frame draw:style-name="fr3" draw:name="Image10" text:anchor-type="char" svg:width="6.006cm" svg:height="10.134cm" draw:z-index="9"><draw:image xlink:href="Pictures/10000001000000E30000017FE13B3805.png" xlink:type="simple" xlink:show="embed" xlink:actuate="onLoad" draw:mime-type="image/png"/></draw:frame></text:p>
      <text:p text:style-name="P1"/>
      <text:p text:style-name="P2">PAGES</text:p>
      <text:p text:style-name="P2"><draw:frame draw:style-name="fr1" draw:name="Image11" text:anchor-type="char" svg:width="6.376cm" svg:height="13.335cm" draw:z-index="10"><draw:image xlink:href="Pictures/10000001000000F1000001F8F0B03518.png" xlink:type="simple" xlink:show="embed" xlink:actuate="onLoad" draw:mime-type="image/png"/></draw:frame></text:p>
      <text:p text:style-name="P2"><text:soft-page-break/>ADMIN / AGENT</text:p>
      <text:p text:style-name="P2"/>
      <text:p text:style-name="P2"><draw:frame draw:style-name="fr1" draw:name="Image12" text:anchor-type="char" svg:width="6.218cm" svg:height="6.747cm" draw:z-index="11"><draw:image xlink:href="Pictures/10000001000000EB000000FFE7DD7A2C.png" xlink:type="simple" xlink:show="embed" xlink:actuate="onLoad" draw:mime-type="image/png"/></draw:frame></text:p>
      <text:p text:style-name="P1"/>
      <text:p text:style-name="P1">UI</text:p>
      <text:p text:style-name="P1"><draw:frame draw:style-name="fr3" draw:name="Image7" text:anchor-type="char" svg:width="5.636cm" svg:height="13.547cm" draw:z-index="6"><draw:image xlink:href="Pictures/10000001000000D5000002008B0D1A28.png" xlink:type="simple" xlink:show="embed" xlink:actuate="onLoad" draw:mime-type="image/png"/></draw:frame></text:p>
      <text:p text:style-name="P1"><draw:frame draw:style-name="fr3" draw:name="Image8" text:anchor-type="char" svg:width="5.636cm" svg:height="13.547cm" draw:z-index="7"><draw:image xlink:href="Pictures/10000001000000D500000200031179AC.png" xlink:type="simple" xlink:show="embed" xlink:actuate="onLoad" draw:mime-type="image/png"/></draw:frame></text:p>
      <text:p text:style-name="P1"><draw:frame draw:style-name="fr1" draw:name="Image9" text:anchor-type="char" svg:width="5.318cm" svg:height="11.113cm" draw:z-index="8"><draw:image xlink:href="Pictures/10000001000000C9000001A48693B9F1.png" xlink:type="simple" xlink:show="embed" xlink:actuate="onLoad" draw:mime-type="image/png"/></draw:frame><text:soft-page-break/></text:p>
      <text:p text:style-name="P1"/>
      <text:p text:style-name="P1">SUPABASE</text:p>
      <text:p text:style-name="P1"><draw:frame draw:style-name="fr2" draw:name="Image5" text:anchor-type="char" svg:width="6.191cm" svg:height="2.99cm" draw:z-index="4"><draw:image xlink:href="Pictures/10000001000000EA00000071A6506D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width="6.429cm" svg:height="4.736cm" draw:z-index="12"><draw:image xlink:href="Pictures/10000001000000F3000000B311E0E5D4.png" xlink:type="simple" xlink:show="embed" xlink:actuate="onLoad" draw:mime-type="image/png"/></draw:frame></text:p>
      <text:p text:style-name="P1"/>
      <text:p text:style-name="P2">MIGRATIONS</text:p>
      <text:p text:style-name="P2"><draw:frame draw:style-name="fr3" draw:name="Image14" text:anchor-type="char" svg:width="7.541cm" svg:height="14.208cm" draw:z-index="13"><draw:image xlink:href="Pictures/100000010000011D000002191CFBB98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23:02:41.334056972</meta:creation-date>
    <dc:date>2026-06-15T23:19:01.231063950</dc:date>
    <meta:editing-duration>PT5M15S</meta:editing-duration>
    <meta:editing-cycles>1</meta:editing-cycles>
    <meta:document-statistic meta:table-count="0" meta:image-count="14" meta:object-count="0" meta:page-count="8" meta:paragraph-count="10" meta:word-count="19" meta:character-count="108" meta:non-whitespace-character-count="99"/>
    <meta:generator>LibreOffice/26.2.2.2$Linux_X86_64 LibreOffice_project/620$Build-2</meta:generator>
  </office:meta>
</office:document-meta>
</file>